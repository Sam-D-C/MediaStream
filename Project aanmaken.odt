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Project aanmaken</text:p>
        </text:list-item>
        <text:list-item>
          <text:p text:style-name="P2">Mappen aanmaken</text:p>
        </text:list-item>
        <text:list-item>
          <text:p text:style-name="P3">Template voor webapi in de backend laden</text:p>
        </text:list-item>
      </text:list>
      <text:p text:style-name="Standaard">Command: dotnet new webapi -n MediaStream.Api –no-openapi</text:p>
      <text:list text:style-name="LFO1" text:continue-numbering="true">
        <text:list-item>
          <text:p text:style-name="P4">Installeer de Taglib# library voor het streamen van de muziek</text:p>
        </text:list-item>
      </text:list>
      <text:p text:style-name="Standaard">Command: dotnet add package taglib-sharp</text:p>
      <text:list text:style-name="LFO1" text:continue-numbering="true">
        <text:list-item>
          <text:p text:style-name="P5">Open de backend API omgeving</text:p>
        </text:list-item>
      </text:list>
      <text:p text:style-name="Standaard">Command: open Backend\MediaStream.API en kies .csproj</text:p>
      <text:list text:style-name="LFO1" text:continue-numbering="true">
        <text:list-item>
          <text:p text:style-name="P6">Maak je models (2 classes in één bestand)</text:p>
        </text:list-item>
        <text:list-item>
          <text:p text:style-name="P7">Maak de service voor het laden van alle bestanden<text:s/></text:p>
        </text:list-item>
        <text:list-item>
          <text:p text:style-name="P8">Controller aanmaken voor afhandelen van HTTP request</text:p>
        </text:list-item>
        <text:list-item>
          <text:p text:style-name="P9">Update de Program.cs en de appsettings.json om de backend te starten</text:p>
        </text:list-item>
        <text:list-item>
          <text:p text:style-name="P10">Start de backend</text:p>
        </text:list-item>
      </text:list>
      <text:p text:style-name="Standaard">Command: Ctrl+F5</text:p>
      <text:list text:style-name="LFO1" text:continue-numbering="true">
        <text:list-item>
          <text:p text:style-name="P11">Template voor frontend</text:p>
        </text:list-item>
      </text:list>
      <text:p text:style-name="Standaard">Command:<text:s/>npm create vite@latest</text:p>
      <text:p text:style-name="Standaard">Kies: Projectnaam, Packagenaam, Vue, Javascript, Install npm</text:p>
      <text:list text:style-name="LFO1" text:continue-numbering="true">
        <text:list-item>
          <text:p text:style-name="P12">Open in VSC en verwijder src/components/HelloWold.vue</text:p>
        </text:list-item>
        <text:list-item>
          <text:p text:style-name="P13">Maak de map src/views</text:p>
        </text:list-item>
        <text:list-item>
          <text:p text:style-name="P14">Zet vite.config.js op de juiste port en API</text:p>
        </text:list-item>
        <text:list-item>
          <text:p text:style-name="P15">Voeg een api.js toe voor communicati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 de Craen</meta:initial-creator>
    <dc:creator>Sam de Craen</dc:creator>
    <meta:creation-date>2026-06-13T23:58:00Z</meta:creation-date>
    <dc:date>2026-06-14T17:53:00Z</dc:date>
    <meta:template xlink:href="Normal.dotm" xlink:type="simple"/>
    <meta:editing-cycles>1</meta:editing-cycles>
    <meta:editing-duration>PT64320S</meta:editing-duration>
    <meta:document-statistic meta:page-count="1" meta:paragraph-count="1" meta:word-count="129" meta:character-count="840" meta:row-count="5" meta:non-whitespace-character-count="712"/>
  </office:meta>
</office:document-meta>
</file>